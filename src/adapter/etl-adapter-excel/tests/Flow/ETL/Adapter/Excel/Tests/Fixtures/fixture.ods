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4.1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3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1"/>
        <table:table-column table:style-name="co1" table:number-columns-repeated="1638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-01</text:p>
          </table:table-cell>
          <table:table-cell table:style-name="ce3" office:value-type="string" calcext:value-type="string">
            <text:p><text:a xlink:href="mailto:user-01@email.com" xlink:type="simple">user-01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-02</text:p>
          </table:table-cell>
          <table:table-cell table:style-name="ce3" office:value-type="string" calcext:value-type="string">
            <text:p><text:a xlink:href="mailto:user-02@email.com" xlink:type="simple">user-02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-03</text:p>
          </table:table-cell>
          <table:table-cell table:style-name="ce3" office:value-type="string" calcext:value-type="string">
            <text:p><text:a xlink:href="mailto:user-01@email.com" xlink:type="simple">user-01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-04</text:p>
          </table:table-cell>
          <table:table-cell table:style-name="ce3" office:value-type="string" calcext:value-type="string">
            <text:p><text:a xlink:href="mailto:user-02@email.com" xlink:type="simple">user-02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-05</text:p>
          </table:table-cell>
          <table:table-cell table:style-name="ce3" office:value-type="string" calcext:value-type="string">
            <text:p><text:a xlink:href="mailto:user-01@email.com" xlink:type="simple">user-01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-06</text:p>
          </table:table-cell>
          <table:table-cell table:style-name="ce3" office:value-type="string" calcext:value-type="string">
            <text:p><text:a xlink:href="mailto:user-02@email.com" xlink:type="simple">user-02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-07</text:p>
          </table:table-cell>
          <table:table-cell table:style-name="ce3" office:value-type="string" calcext:value-type="string">
            <text:p><text:a xlink:href="mailto:user-01@email.com" xlink:type="simple">user-01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-08</text:p>
          </table:table-cell>
          <table:table-cell table:style-name="ce3" office:value-type="string" calcext:value-type="string">
            <text:p><text:a xlink:href="mailto:user-02@email.com" xlink:type="simple">user-02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-09</text:p>
          </table:table-cell>
          <table:table-cell table:style-name="ce3" office:value-type="string" calcext:value-type="string">
            <text:p><text:a xlink:href="mailto:user-02@email.com" xlink:type="simple">user-01@email.com</text:a>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-10</text:p>
          </table:table-cell>
          <table:table-cell table:number-columns-repeated="1638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638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number-columns-repeated="163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-05</text:p>
          </table:table-cell>
          <table:table-cell table:style-name="ce3" office:value-type="string" calcext:value-type="string">
            <text:p><text:a xlink:href="mailto:user-01@email.com" xlink:type="simple">user-01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-06</text:p>
          </table:table-cell>
          <table:table-cell table:style-name="ce3" office:value-type="string" calcext:value-type="string">
            <text:p><text:a xlink:href="mailto:user-02@email.com" xlink:type="simple">user-02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-07</text:p>
          </table:table-cell>
          <table:table-cell table:style-name="ce3" office:value-type="string" calcext:value-type="string">
            <text:p><text:a xlink:href="mailto:user-01@email.com" xlink:type="simple">user-01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-08</text:p>
          </table:table-cell>
          <table:table-cell table:style-name="ce3" office:value-type="string" calcext:value-type="string">
            <text:p><text:a xlink:href="mailto:user-02@email.com" xlink:type="simple">user-02@email.com</text:a></text:p>
          </table:table-cell>
          <table:table-cell table:number-columns-repeated="1638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-09</text:p>
          </table:table-cell>
          <table:table-cell table:style-name="ce3" office:value-type="string" calcext:value-type="string">
            <text:p><text:a xlink:href="mailto:user-02@email.com" xlink:type="simple">user-01@email.com</text:a></text:p>
          </table:table-cell>
          <table:table-cell table:number-columns-repeated="16381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34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8P2" style:volatile="true">
      <number:text loext:blank-width-char="-"> </number:text>
      <number:fill-character> </number:fill-character>
      <number:text loext:blank-width-char="-4">- zł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.00.0000</text:date>, <text:time style:data-style-name="N2" text:time-value="08:45:19.3579471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20:16:25</meta:creation-date>
    <meta:initial-creator>Norbert Orzechowicz</meta:initial-creator>
    <dc:language>pl-PL</dc:language>
    <dc:date>2025-05-19T08:45:42.908661826</dc:date>
    <meta:editing-cycles>8</meta:editing-cycles>
    <meta:editing-duration>PT1M17S</meta:editing-duration>
    <meta:generator>LibreOffice/24.8.2.1$MacOSX_AARCH64 LibreOffice_project/0f794b6e29741098670a3b95d60478a65d05ef13</meta:generator>
    <meta:document-statistic meta:table-count="2" meta:cell-count="50" meta:object-count="0"/>
    <meta:user-defined meta:name="AppVersion">15.0000</meta:user-defined>
  </office:meta>
</office:document-meta>
</file>