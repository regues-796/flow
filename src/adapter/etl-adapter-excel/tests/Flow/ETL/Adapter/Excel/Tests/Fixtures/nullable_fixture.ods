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tos Narrow" svg:font-family="'Aptos Narrow'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4.195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67886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hyperlink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er-01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er-02</text:p>
          </table:table-cell>
          <table:table-cell table:style-name="ce2" office:value-type="string" calcext:value-type="string">
            <text:p><text:a xlink:href="mailto:user-02@email.com" xlink:type="simple">user-02@email.com</text:a>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<text:a xlink:href="mailto:user-01@email.com" xlink:type="simple">user-01@email.com</text:a>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er-04</text:p>
          </table:table-cell>
          <table:table-cell table:style-name="ce2" office:value-type="string" calcext:value-type="string">
            <text:p><text:a xlink:href="mailto:user-02@email.com" xlink:type="simple">user-02@email.com</text:a></text:p>
          </table:table-cell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r-05</text:p>
          </table:table-cell>
          <table:table-cell table:style-name="ce2" office:value-type="string" calcext:value-type="string">
            <text:p><text:a xlink:href="mailto:user-01@email.com" xlink:type="simple">user-01@email.com</text:a></text:p>
          </table:table-cell>
          <table:table-cell table:number-columns-repeated="16381"/>
        </table:table-row>
        <table:table-row table:style-name="ro1" table:number-rows-repeated="4">
          <table:table-cell table:number-columns-repeated="2"/>
          <table:table-cell table:style-name="ce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tos Narrow" svg:font-family="'Aptos Narrow'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zł</number:text>
    </number:number-style>
    <number:number-style style:name="N114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zł</number:text>
    </number:number-style>
    <number:number-style style:name="N116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zł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z1_ł3">  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z1_ł3">  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z1_ł3">  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z1_ł3">  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z1_ł3">  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z1_ł3">  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z1_ł3">  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z1_ł3">  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z1_ł3_-5">  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z1_ł3_-5">      </number:text>
    </number:number-style>
    <number:number-style style:name="N127P2" style:volatile="true">
      <number:text loext:blank-width-char="-"> </number:text>
      <number:fill-character> </number:fill-character>
      <number:text loext:blank-width-char="z2_ł4_-6">-  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zł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zł </number:text>
    </number:number-style>
    <number:number-style style:name="N128P2" style:volatile="true">
      <number:text loext:blank-width-char="-"> </number:text>
      <number:fill-character> </number:fill-character>
      <number:text loext:blank-width-char="-4">- zł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z1_ł3_-5">  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z1_ł3_-5">  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z1_ł3_-5">  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zł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zł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zł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67886" style:text-outline="false" style:text-line-through-style="none" style:text-line-through-type="none" style:font-name="Aptos Narrow" fo:font-family="'Aptos Narrow'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20:16:25</meta:creation-date>
    <meta:initial-creator>Norbert Orzechowicz</meta:initial-creator>
    <dc:language>pl-PL</dc:language>
    <dc:date>2025-05-19T13:25:35.012492851</dc:date>
    <meta:editing-cycles>9</meta:editing-cycles>
    <meta:editing-duration>PT1M42S</meta:editing-duration>
    <meta:generator>LibreOffice/24.8.2.1$MacOSX_AARCH64 LibreOffice_project/0f794b6e29741098670a3b95d60478a65d05ef13</meta:generator>
    <meta:document-statistic meta:table-count="1" meta:cell-count="16" meta:object-count="0"/>
    <meta:user-defined meta:name="AppVersion">15.0000</meta:user-defined>
  </office:meta>
</office:document-meta>
</file>